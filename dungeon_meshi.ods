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6.34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ackground-color="#ffde59"/>
    </style:style>
    <style:style style:name="ce16" style:family="table-cell" style:parent-style-name="Default">
      <style:table-cell-properties fo:background-color="#ffd7d7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i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 // 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Possessed La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style-name="ce16"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,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,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,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,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,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style-name="ce15" office:value-type="string" calcext:value-type="string">
            <text:p>Gol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5:07:03.460966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2T16:40:35.925524752</dc:date>
    <meta:editing-duration>PT15H19M55S</meta:editing-duration>
    <meta:editing-cycles>40</meta:editing-cycles>
    <meta:generator>LibreOffice/26.2.2.2$Linux_X86_64 LibreOffice_project/620$Build-2</meta:generator>
    <meta:document-statistic meta:table-count="1" meta:cell-count="652" meta:object-count="0"/>
  </office:meta>
</office:document-meta>
</file>